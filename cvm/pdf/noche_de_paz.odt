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font-size="20pt" fo:font-weight="bold" officeooo:paragraph-rsid="00116d87" style:font-size-asian="20pt" style:font-size-complex="20pt"/>
    </style:style>
    <style:style style:name="P2" style:family="paragraph" style:parent-style-name="Horizontal_20_Line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.423cm" fo:margin-right="0.423cm" fo:margin-top="0.423cm" fo:margin-bottom="0.423cm" style:contextual-spacing="false" fo:text-indent="0cm" style:auto-text-indent="false"/>
      <style:text-properties fo:font-size="20pt" style:font-size-asian="20pt" style:font-size-complex="20pt"/>
    </style:style>
    <style:style style:name="P4" style:family="paragraph" style:parent-style-name="Text_20_body">
      <style:paragraph-properties fo:margin-left="0.423cm" fo:margin-right="0.423cm" fo:margin-top="0.423cm" fo:margin-bottom="0.423cm" style:contextual-spacing="false" fo:text-indent="0cm" style:auto-text-indent="false"/>
      <style:text-properties fo:font-size="20pt" fo:font-weight="normal" officeooo:paragraph-rsid="0014a5c3" style:font-size-asian="20pt" style:font-size-complex="20pt"/>
    </style:style>
    <style:style style:name="P5" style:family="paragraph" style:parent-style-name="Text_20_body">
      <style:paragraph-properties fo:margin-left="0.423cm" fo:margin-right="0.423cm" fo:margin-top="0.423cm" fo:margin-bottom="0.423cm" style:contextual-spacing="false" fo:text-indent="0cm" style:auto-text-indent="false"/>
      <style:text-properties fo:font-size="20pt" fo:font-weight="normal" officeooo:paragraph-rsid="0013655e" style:font-size-asian="20pt" style:font-size-complex="20pt"/>
    </style:style>
    <style:style style:name="P6" style:family="paragraph" style:parent-style-name="Text_20_body">
      <style:paragraph-properties fo:margin-left="0.423cm" fo:margin-right="0.423cm" fo:margin-top="0.423cm" fo:margin-bottom="0.423cm" style:contextual-spacing="false" fo:text-indent="0cm" style:auto-text-indent="false"/>
      <style:text-properties fo:font-size="20pt" fo:font-weight="normal" officeooo:paragraph-rsid="00167698" style:font-size-asian="20pt" style:font-size-complex="20pt"/>
    </style:style>
    <style:style style:name="P7" style:family="paragraph" style:parent-style-name="Horizontal_20_Line">
      <style:text-properties fo:font-size="20pt" style:font-size-asian="20pt" style:font-size-complex="20pt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fo:font-size="20pt" style:font-size-asian="20pt" style:font-size-complex="20pt"/>
    </style:style>
    <style:style style:name="T1" style:family="text">
      <style:text-properties fo:font-weight="normal"/>
    </style:style>
    <style:style style:name="T2" style:family="text">
      <style:text-properties fo:font-weight="normal" officeooo:rsid="0013655e"/>
    </style:style>
    <style:style style:name="T3" style:family="text">
      <style:text-properties officeooo:rsid="00136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OCHE DE PAZ</text:h>
      <text:p text:style-name="P2"/>
      <text:p text:style-name="P3"><text:span text:style-name="T1"><text:line-break/>NOCHE DE PAZ, NOCHE DE AMOR<text:line-break/>TODO DUERME </text:span><text:span text:style-name="T2">EN </text:span><text:span text:style-name="T1">DERREDOR</text:span></text:p>
      <text:p text:style-name="P4"><text:line-break/>ENTRE LOS ASTROS QUE ESPARCEN SU LUZ<text:line-break/><text:span text:style-name="T3">VIENE</text:span>, ANUNCIANDO AL NIÑO JESÚS<text:line-break/>BRILLA LA ESTRELLA DE PAZ<text:line-break/>BRILLA LA ESTRELLA DE <text:span text:style-name="T3">PAZ</text:span></text:p>
      <text:p text:style-name="P5"><text:line-break/>NOCHE DE PAZ, NOCHE DE <text:span text:style-name="T3">AMOR</text:span><text:line-break/>TODO DUERME <text:span text:style-name="T3">EN </text:span>DERREDOR</text:p>
      <text:p text:style-name="P5"/>
      <text:p text:style-name="P6"><text:span text:style-name="T3">ENTRE LOS ASTROS QUE ESPARCEN SU LUZ</text:span><text:line-break/><text:span text:style-name="T3">VIENE ENUNCIANDO AL</text:span> NIÑO JESÚS<text:line-break/><text:span text:style-name="T3">BRILLA LA ESTRELLA DE PAZ<text:line-break/><text:line-break/>BRILLA LA ESTRELLA DE PAZ</text:span></text:p>
      <text:p text:style-name="P7"/>
      <text:h text:style-name="P8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5T15:18:03.052498786</meta:creation-date>
    <dc:date>2026-06-05T15:43:33.547959809</dc:date>
    <meta:editing-duration>PT17M51S</meta:editing-duration>
    <meta:editing-cycles>5</meta:editing-cycles>
    <meta:generator>LibreOffice/25.2.3.2$Linux_X86_64 LibreOffice_project/520$Build-2</meta:generator>
    <meta:document-statistic meta:table-count="0" meta:image-count="0" meta:object-count="0" meta:page-count="1" meta:paragraph-count="5" meta:word-count="67" meta:character-count="357" meta:non-whitespace-character-count="291"/>
  </office:meta>
</office:document-meta>
</file>